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C000002BC8139680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449cm" svg:height="7.449cm" svg:x="6.775cm" svg:y="16.9cm">
          <draw:image xlink:href="Pictures/10000000000002BC000002BC8139680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2-15T17:20:43.397000000</dc:date>
    <meta:editing-duration>PT1M12S</meta:editing-duration>
    <meta:editing-cycles>1</meta:editing-cycles>
    <meta:document-statistic meta:object-count="1"/>
    <meta:generator>LibreOffice/5.0.1.2$Windows_x86 LibreOffice_project/81898c9f5c0d43f3473ba111d7b351050be20261</meta:generator>
  </office:meta>
</office:document-meta>
</file>