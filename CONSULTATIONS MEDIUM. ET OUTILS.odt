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>
      <style:text-properties fo:font-size="15pt" fo:font-weight="bold" officeooo:rsid="00157ca1" officeooo:paragraph-rsid="0011dc47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3pt" fo:font-weight="normal" officeooo:rsid="00174679" officeooo:paragraph-rsid="00174679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5pt" fo:font-weight="bold" officeooo:rsid="001ed9a9" officeooo:paragraph-rsid="0014468f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157ca1" officeooo:paragraph-rsid="0014468f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3pt" fo:font-weight="normal" officeooo:rsid="0014468f" officeooo:paragraph-rsid="0014468f" style:font-size-asian="11.3500003814697pt" style:font-weight-asian="normal" style:font-size-complex="13pt" style:font-weight-complex="normal"/>
    </style:style>
    <style:style style:name="P6" style:family="paragraph" style:parent-style-name="Standard">
      <style:text-properties fo:font-size="13pt" fo:font-weight="bold" officeooo:rsid="0015aa74" officeooo:paragraph-rsid="0015aa74" style:font-size-asian="11.3500003814697pt" style:font-weight-asian="bold" style:font-size-complex="13pt" style:font-weight-complex="bold"/>
    </style:style>
    <style:style style:name="P7" style:family="paragraph" style:parent-style-name="Standard">
      <style:text-properties fo:font-size="13pt" fo:font-weight="normal" officeooo:rsid="0015aa74" officeooo:paragraph-rsid="0015aa74" style:font-size-asian="11.3500003814697pt" style:font-weight-asian="normal" style:font-size-complex="13pt" style:font-weight-complex="normal"/>
    </style:style>
    <style:style style:name="P8" style:family="paragraph" style:parent-style-name="Standard">
      <style:text-properties fo:font-size="13pt" fo:font-weight="normal" officeooo:rsid="0017fdbb" officeooo:paragraph-rsid="0017fdbb" style:font-size-asian="11.3500003814697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bold" officeooo:rsid="0019458f" officeooo:paragraph-rsid="0019458f" style:font-size-asian="11.3500003814697pt" style:font-weight-asian="bold" style:font-size-complex="13pt" style:font-weight-complex="bold"/>
    </style:style>
    <style:style style:name="P10" style:family="paragraph" style:parent-style-name="Standard">
      <style:text-properties fo:font-size="13pt" fo:font-weight="normal" officeooo:rsid="0019458f" officeooo:paragraph-rsid="0019458f" style:font-size-asian="11.3500003814697pt" style:font-weight-asian="normal" style:font-size-complex="13pt" style:font-weight-complex="normal"/>
    </style:style>
    <style:style style:name="T1" style:family="text">
      <style:text-properties officeooo:rsid="001ed9a9"/>
    </style:style>
    <style:style style:name="T2" style:family="text">
      <style:text-properties officeooo:rsid="00212d54"/>
    </style:style>
    <style:style style:name="T3" style:family="text">
      <style:text-properties officeooo:rsid="00133069"/>
    </style:style>
    <style:style style:name="T4" style:family="text">
      <style:text-properties officeooo:rsid="0015aa74"/>
    </style:style>
    <style:style style:name="T5" style:family="text">
      <style:text-properties officeooo:rsid="001e474f"/>
    </style:style>
    <style:style style:name="T6" style:family="text">
      <style:text-properties officeooo:rsid="001bf9f5"/>
    </style:style>
    <style:style style:name="T7" style:family="text">
      <style:text-properties officeooo:rsid="0019458f"/>
    </style:style>
    <style:style style:name="T8" style:family="text">
      <style:text-properties officeooo:rsid="001b56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ONSULTATIONS MÉDIUMNIQUES </text:span><text:span text:style-name="T2">ET OUTILS DE SO</text:span><text:span text:style-name="T3">RTIE DE SA MATRICE PERSONNELLE </text:span></text:p>
      <text:p text:style-name="P1"/>
      <text:p text:style-name="P2">Image Old life New life </text:p>
      <text:p text:style-name="P1"/>
      <text:p text:style-name="P1"/>
      <text:p text:style-name="P3"/>
      <text:p text:style-name="P3"/>
      <text:p text:style-name="P3">CONSULTATIONS MÉDIUMNIQUES</text:p>
      <text:p text:style-name="P4"/>
      <text:p text:style-name="P5"><text:span text:style-name="T4">Présentation à partir d</text:span>es vidéos <text:span text:style-name="T5">sur YouTube qui sont dans le site initial</text:span></text:p>
      <text:p text:style-name="P5"/>
      <text:p text:style-name="P5"/>
      <text:p text:style-name="P5"/>
      <text:p text:style-name="P4"/>
      <text:p text:style-name="P4"/>
      <text:p text:style-name="P4"><text:span text:style-name="T2">OUTILS DE SO</text:span><text:span text:style-name="T3">RTIE DE SA MATRICE PERSONNELLE</text:span></text:p>
      <text:p text:style-name="P4"/>
      <text:p text:style-name="P6"/>
      <text:p text:style-name="P6"><text:span text:style-name="T6">STAGE = </text:span><text:span text:style-name="T7">TRANSMUTER SA PEUR DE BASE </text:span>= <text:span text:style-name="T7">MOTEUR D’INCARNATION N.1</text:span></text:p>
      <text:p text:style-name="P7">Transmuter l’énergie considérable perdue à lutter contre la peur et la mettre à disposition de la mission</text:p>
      <text:p text:style-name="P6"/>
      <text:p text:style-name="P8">Image du chat qui se regarde en Lion</text:p>
      <text:p text:style-name="P6"/>
      <text:p text:style-name="P9"/>
      <text:p text:style-name="P9">ÊTRE CRÉATEUR <text:span text:style-name="T8">DE SA VIE </text:span></text:p>
      <text:p text:style-name="P9"/>
      <text:p text:style-name="P9"/>
      <text:p text:style-name="P10">DVD DEBOWSKA de 10/2022 – « LA NOUVELLE LIGNE SPATIO TEMPORELLE – ÊTRE CRÉATEUR DE NOTRE EXISTENCE »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Normal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Normal" style:font-family-generic="roman" style:font-pitch="variable" fo:font-size="13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1T12:21:06.538257400</meta:creation-date>
    <dc:title>DEFAUT</dc:title>
    <meta:editing-duration>PT22M31S</meta:editing-duration>
    <meta:editing-cycles>11</meta:editing-cycles>
    <meta:generator>LibreOffice/25.2.7.2$Windows_X86_64 LibreOffice_project/5cbfd1ab6520636bb5f7b99185aa69bd7456825d</meta:generator>
    <dc:date>2026-04-17T13:26:48.749095300</dc:date>
    <meta:document-statistic meta:table-count="0" meta:image-count="0" meta:object-count="0" meta:page-count="1" meta:paragraph-count="10" meta:word-count="94" meta:character-count="565" meta:non-whitespace-character-count="476"/>
    <meta:template xlink:type="simple" xlink:actuate="onRequest" xlink:title="DEFAUT" xlink:href="../../../AppData/Roaming/LibreOffice/4/user/template/DEFAUT.ott" meta:date="2026-04-11T12:21:06.403472200"/>
  </office:meta>
</office:document-meta>
</file>