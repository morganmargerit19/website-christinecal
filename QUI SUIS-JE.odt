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fo:font-size="20pt" fo:font-weight="bold" officeooo:rsid="001553a9" officeooo:paragraph-rsid="001553a9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3pt" fo:font-style="italic" fo:font-weight="bold" officeooo:rsid="00342b47" officeooo:paragraph-rsid="001553a9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Standard">
      <style:text-properties fo:font-style="italic" fo:font-weight="bold" officeooo:rsid="001553a9" officeooo:paragraph-rsid="003207d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1553a9" officeooo:paragraph-rsid="001553a9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rsid="001553a9" officeooo:paragraph-rsid="001553a9"/>
    </style:style>
    <style:style style:name="P6" style:family="paragraph" style:parent-style-name="Standard">
      <style:text-properties fo:font-weight="normal" officeooo:rsid="00302232" officeooo:paragraph-rsid="001553a9" style:font-weight-asian="normal" style:font-weight-complex="normal"/>
    </style:style>
    <style:style style:name="P7" style:family="paragraph" style:parent-style-name="Standard">
      <style:text-properties officeooo:rsid="001553a9" officeooo:paragraph-rsid="001b1ce9"/>
    </style:style>
    <style:style style:name="P8" style:family="paragraph" style:parent-style-name="Standard">
      <style:text-properties officeooo:rsid="0016fcea" officeooo:paragraph-rsid="0016fcea"/>
    </style:style>
    <style:style style:name="P9" style:family="paragraph" style:parent-style-name="Standard">
      <style:text-properties officeooo:rsid="00399edb" officeooo:paragraph-rsid="00399edb"/>
    </style:style>
    <style:style style:name="P10" style:family="paragraph" style:parent-style-name="Standard">
      <style:text-properties fo:font-weight="bold" officeooo:rsid="001553a9" officeooo:paragraph-rsid="001553a9" style:font-weight-asian="bold" style:font-weight-complex="bold"/>
    </style:style>
    <style:style style:name="P11" style:family="paragraph" style:parent-style-name="Standard">
      <style:text-properties officeooo:rsid="001553a9" officeooo:paragraph-rsid="003a8930"/>
    </style:style>
    <style:style style:name="P12" style:family="paragraph" style:parent-style-name="Standard">
      <style:text-properties fo:font-weight="bold" officeooo:rsid="0018f0f5" officeooo:paragraph-rsid="0015b6ee" style:font-weight-asian="bold" style:font-weight-complex="bold"/>
    </style:style>
    <style:style style:name="P13" style:family="paragraph" style:parent-style-name="Standard">
      <style:text-properties fo:font-weight="bold" officeooo:rsid="0018f0f5" officeooo:paragraph-rsid="0018f0f5" style:font-weight-asian="bold" style:font-weight-complex="bold"/>
    </style:style>
    <style:style style:name="P14" style:family="paragraph" style:parent-style-name="Standard">
      <style:text-properties fo:font-weight="normal" officeooo:rsid="00174334" officeooo:paragraph-rsid="00174334" style:font-weight-asian="normal" style:font-weight-complex="normal"/>
    </style:style>
    <style:style style:name="P15" style:family="paragraph" style:parent-style-name="Standard">
      <style:text-properties officeooo:rsid="00174334" officeooo:paragraph-rsid="00174334"/>
    </style:style>
    <style:style style:name="P16" style:family="paragraph" style:parent-style-name="Standard">
      <style:text-properties officeooo:rsid="0015b6ee" officeooo:paragraph-rsid="001b1ce9"/>
    </style:style>
    <style:style style:name="P17" style:family="paragraph" style:parent-style-name="Standard">
      <style:text-properties fo:font-weight="bold" officeooo:rsid="00174334" officeooo:paragraph-rsid="001b1ce9" style:font-weight-asian="bold" style:font-weight-complex="bold"/>
    </style:style>
    <style:style style:name="P18" style:family="paragraph" style:parent-style-name="Standard">
      <style:text-properties officeooo:rsid="00174334" officeooo:paragraph-rsid="003c4a1b"/>
    </style:style>
    <style:style style:name="P19" style:family="paragraph" style:parent-style-name="Standard">
      <style:text-properties fo:font-weight="bold" officeooo:rsid="0023aa83" officeooo:paragraph-rsid="001b1ce9" style:font-weight-asian="bold" style:font-weight-complex="bold"/>
    </style:style>
    <style:style style:name="P20" style:family="paragraph" style:parent-style-name="Standard">
      <style:text-properties officeooo:rsid="001a474a" officeooo:paragraph-rsid="003e0615"/>
    </style:style>
    <style:style style:name="P21" style:family="paragraph" style:parent-style-name="Standard">
      <style:text-properties officeooo:rsid="0023aa83" officeooo:paragraph-rsid="0023aa83"/>
    </style:style>
    <style:style style:name="P22" style:family="paragraph" style:parent-style-name="Standard">
      <style:text-properties fo:font-weight="bold" officeooo:rsid="00253aec" officeooo:paragraph-rsid="0023aa83" style:font-weight-asian="bold" style:font-weight-complex="bold"/>
    </style:style>
    <style:style style:name="P23" style:family="paragraph" style:parent-style-name="Standard">
      <style:text-properties fo:font-weight="bold" officeooo:rsid="0026f495" officeooo:paragraph-rsid="0026f495" style:font-weight-asian="bold" style:font-weight-complex="bold"/>
    </style:style>
    <style:style style:name="P24" style:family="paragraph" style:parent-style-name="Standard">
      <style:text-properties officeooo:rsid="0015b6ee" officeooo:paragraph-rsid="0015b6ee"/>
    </style:style>
    <style:style style:name="P25" style:family="paragraph" style:parent-style-name="Standard">
      <style:text-properties fo:font-weight="bold" officeooo:rsid="0023aa83" officeooo:paragraph-rsid="0023aa83" style:font-weight-asian="bold" style:font-weight-complex="bold"/>
    </style:style>
    <style:style style:name="P26" style:family="paragraph" style:parent-style-name="Standard">
      <style:text-properties officeooo:rsid="003533dc" officeooo:paragraph-rsid="001553a9"/>
    </style:style>
    <style:style style:name="T1" style:family="text">
      <style:text-properties officeooo:rsid="002871f6"/>
    </style:style>
    <style:style style:name="T2" style:family="text">
      <style:text-properties officeooo:rsid="003207dd"/>
    </style:style>
    <style:style style:name="T3" style:family="text">
      <style:text-properties officeooo:rsid="00302232"/>
    </style:style>
    <style:style style:name="T4" style:family="text">
      <style:text-properties officeooo:rsid="0038837f"/>
    </style:style>
    <style:style style:name="T5" style:family="text">
      <style:text-properties officeooo:rsid="001f8ec5"/>
    </style:style>
    <style:style style:name="T6" style:family="text">
      <style:text-properties officeooo:rsid="002eb2cd"/>
    </style:style>
    <style:style style:name="T7" style:family="text">
      <style:text-properties officeooo:rsid="00399edb"/>
    </style:style>
    <style:style style:name="T8" style:family="text">
      <style:text-properties fo:font-weight="bold" officeooo:rsid="001b1ce9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officeooo:rsid="00302232" style:font-weight-asian="normal" style:font-weight-complex="normal"/>
    </style:style>
    <style:style style:name="T11" style:family="text">
      <style:text-properties fo:font-weight="bold" officeooo:rsid="00302232" style:font-weight-asian="bold" style:font-weight-complex="bold"/>
    </style:style>
    <style:style style:name="T12" style:family="text">
      <style:text-properties officeooo:rsid="0020b38a"/>
    </style:style>
    <style:style style:name="T13" style:family="text">
      <style:text-properties fo:font-weight="bold" officeooo:rsid="0020b38a" style:font-weight-asian="bold" style:font-weight-complex="bold"/>
    </style:style>
    <style:style style:name="T14" style:family="text">
      <style:text-properties officeooo:rsid="002211c7"/>
    </style:style>
    <style:style style:name="T15" style:family="text">
      <style:text-properties officeooo:rsid="004201f9"/>
    </style:style>
    <style:style style:name="T16" style:family="text">
      <style:text-properties officeooo:rsid="0023aa83"/>
    </style:style>
    <style:style style:name="T17" style:family="text">
      <style:text-properties officeooo:rsid="00174334"/>
    </style:style>
    <style:style style:name="T18" style:family="text">
      <style:text-properties officeooo:rsid="001b1ce9"/>
    </style:style>
    <style:style style:name="T19" style:family="text">
      <style:text-properties fo:font-weight="normal" officeooo:rsid="001b1ce9" style:font-weight-asian="normal" style:font-weight-complex="normal"/>
    </style:style>
    <style:style style:name="T20" style:family="text">
      <style:text-properties officeooo:rsid="0018f0f5"/>
    </style:style>
    <style:style style:name="T21" style:family="text">
      <style:text-properties officeooo:rsid="0015b6ee"/>
    </style:style>
    <style:style style:name="T22" style:family="text">
      <style:text-properties officeooo:rsid="0016fcea"/>
    </style:style>
    <style:style style:name="T23" style:family="text">
      <style:text-properties officeooo:rsid="003a8930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3aa83" style:font-weight-asian="normal" style:font-weight-complex="normal"/>
    </style:style>
    <style:style style:name="T26" style:family="text">
      <style:text-properties fo:font-weight="normal" officeooo:rsid="00253aec" style:font-weight-asian="normal" style:font-weight-complex="normal"/>
    </style:style>
    <style:style style:name="T27" style:family="text">
      <style:text-properties fo:font-weight="normal" officeooo:rsid="003a8930" style:font-weight-asian="normal" style:font-weight-complex="normal"/>
    </style:style>
    <style:style style:name="T28" style:family="text">
      <style:text-properties fo:font-weight="bold" officeooo:rsid="0018f0f5" style:font-weight-asian="bold" style:font-weight-complex="bold"/>
    </style:style>
    <style:style style:name="T29" style:family="text">
      <style:text-properties fo:font-weight="normal" officeooo:rsid="0018f0f5" style:font-weight-asian="normal" style:font-weight-complex="normal"/>
    </style:style>
    <style:style style:name="T30" style:family="text">
      <style:text-properties fo:font-weight="bold" officeooo:rsid="003c4a1b" style:font-weight-asian="bold" style:font-weight-complex="bold"/>
    </style:style>
    <style:style style:name="T31" style:family="text">
      <style:text-properties fo:font-weight="bold" officeooo:rsid="003e0615" style:font-weight-asian="bold" style:font-weight-complex="bold"/>
    </style:style>
    <style:style style:name="T32" style:family="text">
      <style:text-properties officeooo:rsid="0026f495"/>
    </style:style>
    <style:style style:name="T33" style:family="text">
      <style:text-properties fo:font-weight="bold" officeooo:rsid="0026f495" style:font-weight-asian="bold" style:font-weight-complex="bold"/>
    </style:style>
    <style:style style:name="T34" style:family="text">
      <style:text-properties fo:font-weight="bold" officeooo:rsid="00253aec" style:font-weight-asian="bold" style:font-weight-complex="bold"/>
    </style:style>
    <style:style style:name="T35" style:family="text">
      <style:text-properties fo:font-weight="normal" officeooo:rsid="004201f9" style:font-weight-asian="normal" style:font-weight-complex="normal"/>
    </style:style>
    <style:style style:name="T36" style:family="text">
      <style:text-properties officeooo:rsid="003c4a1b"/>
    </style:style>
    <style:style style:name="T37" style:family="text">
      <style:text-properties officeooo:rsid="003e0615"/>
    </style:style>
    <style:style style:name="T38" style:family="text">
      <style:text-properties officeooo:rsid="003ef8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GE </text:span>QUI SUIS JE ?</text:p>
      <text:p text:style-name="P2"/>
      <text:p text:style-name="P1"/>
      <text:p text:style-name="P3">U<text:span text:style-name="T1">N </text:span><text:span text:style-name="T2">ÊTRE</text:span><text:span text:style-name="T3"> ATYPIQUE </text:span><text:span text:style-name="T2">EN CONTACT AVEC SES VERSIONS DU FUTUR</text:span></text:p>
      <text:p text:style-name="P3"/>
      <text:p text:style-name="P3"><text:span text:style-name="T3">UN</text:span><text:span text:style-name="T1">E GALACTIQUE VENUE DU FUTUR </text:span><text:span text:style-name="T2">qui a</text:span> réintégr<text:span text:style-name="T2">é </text:span>ses fractales Terrestres et <text:span text:style-name="T2">œuvre avec </text:span><text:span text:style-name="T1">ses fractales </text:span>Célestes <text:span text:style-name="T2">à travers les différentes </text:span><text:span text:style-name="T4">T</text:span><text:span text:style-name="T2">ime-</text:span><text:span text:style-name="T4">L</text:span><text:span text:style-name="T2">ines. </text:span></text:p>
      <text:p text:style-name="P4"/>
      <text:p text:style-name="P4"/>
      <text:p text:style-name="P5">Une petite fille choquée par un monde inversé</text:p>
      <text:p text:style-name="P5"/>
      <text:p text:style-name="P5">Une adolescente <text:span text:style-name="T5">passionnée par</text:span> l<text:span text:style-name="T5">es sciences humaines qui a étudié l</text:span>a psychologie <text:span text:style-name="T6">humaine </text:span>et les religions <text:span text:style-name="T4">et courants philosophiques </text:span><text:span text:style-name="T6">cré</text:span><text:span text:style-name="T7">e</text:span><text:span text:style-name="T6">s</text:span></text:p>
      <text:p text:style-name="P5"/>
      <text:p text:style-name="P5"><text:span text:style-name="T3">Un cerveau gauche musclé = </text:span><text:span text:style-name="T8">E</text:span><text:span text:style-name="T9">xpert comptable en libéral </text:span>de 1993 à 2013</text:p>
      <text:p text:style-name="P6"/>
      <text:p text:style-name="P5"><text:span text:style-name="T10">Un cerveau droit déployé </text:span><text:span text:style-name="T11">= </text:span><text:span text:style-name="T8">M</text:span><text:span text:style-name="T9">édium clairvoyante et clairaudiente</text:span> <text:span text:style-name="T12">en contacts avec de</text:span> nombreux mondes parallèles.</text:p>
      <text:p text:style-name="P5"><text:span text:style-name="T7">Une grossesse vécue en</text:span><text:span text:style-name="T12"> conscien</text:span><text:span text:style-name="T7">ce</text:span><text:span text:style-name="T12"> avec l’Âme de m</text:span><text:span text:style-name="T7">a fille </text:span><text:span text:style-name="T12">en 1999.</text:span></text:p>
      <text:p text:style-name="P5"/>
      <text:p text:style-name="P7"><text:span text:style-name="T9">Coach Consultant </text:span><text:span text:style-name="T13">=</text:span> <text:span text:style-name="T12">Création</text:span> et anim<text:span text:style-name="T12">ation</text:span> de stages de développement personnel <text:span text:style-name="T7">depuis plus de 20 ans.</text:span></text:p>
      <text:p text:style-name="P5"/>
      <text:p text:style-name="P8">Canalisation de Maîtres divers ( OMA pendant 15 ans / Maîtres Ascensionnés <text:span text:style-name="T14">dont</text:span> Saint Germain sur le Mont Shasta ). <text:span text:style-name="T14">C</text:span>ertains <text:span text:style-name="T15">Maîtres </text:span>m’ont visité dans leur propre Merkaba. </text:p>
      <text:p text:style-name="P5"/>
      <text:p text:style-name="P5"><text:span text:style-name="T8">C</text:span><text:span text:style-name="T9">onférencière depuis 2013</text:span> = Paris / Nîmes / Rennes / Biarritz ( Forum International <text:span text:style-name="T7">sur le féminin </text:span>) Périgueux / Plazac / Toulouse / Rennes-Les-Bains <text:span text:style-name="T16">( Organisation de Forum </text:span><text:span text:style-name="T7">en 2025 </text:span><text:span text:style-name="T16">) </text:span>/ Limoges… Intervention dans diverses Associations en France ou via Zoom.</text:p>
      <text:p text:style-name="P9">Sur divers sujets = La vie après la mort, la conscience expansée …...</text:p>
      <text:p text:style-name="P5"/>
      <text:p text:style-name="P10">Création d’un enseignement <text:span text:style-name="T17">Initiatique</text:span> sur le Corps de Lumière cristallin et Vortex de l’Âme <text:span text:style-name="T18">=</text:span><text:span text:style-name="T19"> Véritable Corps de l’Âme / SOI = « Pass Galactique »</text:span></text:p>
      <text:p text:style-name="P11">= Synthèse autodidacte de mon expérience à partir de stages avec <text:span text:style-name="T17">un</text:span> Scientifique <text:span text:style-name="T20">é</text:span><text:span text:style-name="T17">veillé</text:span> <text:span text:style-name="T21">de</text:span> la NASA, <text:span text:style-name="T20">avec </text:span>des Russes <text:span text:style-name="T20">particulièrement avant gardistes, </text:span><text:span text:style-name="T17">et surtout des </text:span><text:span text:style-name="T22">Instructions reçues d’Êtres de 5ème dimension </text:span><text:span text:style-name="T20">concernant la géométrie dans la galaxie </text:span><text:span text:style-name="T17">et </text:span><text:span text:style-name="T20">d’un </text:span><text:span text:style-name="T17">document secret reçu au MONT SHASTA en 201</text:span><text:span text:style-name="T20">8 </text:span><text:span text:style-name="T22">)</text:span></text:p>
      <text:p text:style-name="P11"><text:span text:style-name="T21">Formation de Plus de 9</text:span><text:span text:style-name="T23">5</text:span><text:span text:style-name="T21">0 personnes </text:span><text:span text:style-name="T17">depuis 2013.</text:span></text:p>
      <text:p text:style-name="P12"/>
      <text:p text:style-name="P13">TELOS 2003 – Nombreux contacts et voyages astraux <text:span text:style-name="T24">avec le peuple Intra terrestre </text:span><text:span text:style-name="T25">de TELOS </text:span><text:span text:style-name="T24">sous le MONT SHASTA en Californie et rencontre avec Aur</text:span><text:span text:style-name="T26">e</text:span><text:span text:style-name="T24">lia Louise Jones </text:span><text:span text:style-name="T27">en 2004.</text:span></text:p>
      <text:p text:style-name="P14"/>
      <text:p text:style-name="P15"><text:span text:style-name="T9">Organisatrice de voyages </text:span><text:span text:style-name="T28">Initiatiques </text:span><text:span text:style-name="T9">au MONT SHASTA de 2014 à 2019 </text:span><text:span text:style-name="T29">et </text:span><text:span text:style-name="T25">de</text:span><text:span text:style-name="T29"> </text:span><text:span text:style-name="T25">R</text:span><text:span text:style-name="T29">encontres Internationales</text:span><text:span text:style-name="T28"> avec le Réseau TELOS MONDIAL </text:span><text:span text:style-name="T26">et Diann</text:span><text:span text:style-name="T29">e Robbins. </text:span></text:p>
      <text:p text:style-name="P16"/>
      <text:p text:style-name="P17"/>
      <text:p text:style-name="P18"><text:soft-page-break/><text:span text:style-name="T9">Spécialiste du Voyage astral </text:span><text:span text:style-name="T30">et contacts avec</text:span><text:span text:style-name="T9"> divers peuples Intra et Extra terrestres depuis 2003.</text:span></text:p>
      <text:p text:style-name="P19"/>
      <text:p text:style-name="P20"><text:span text:style-name="T31">2024 - </text:span><text:span text:style-name="T9">Création de stages / </text:span><text:span text:style-name="T11">Multidimensionnalité de l’être </text:span><text:span text:style-name="T18">avec synthèse de la phase Terrestre ( Fractales Terrestres dites Vies passées ) en préparation de la phase Céleste ( Fractale Céleste dit</text:span><text:span text:style-name="T32">e</text:span><text:span text:style-name="T18"> Futur ).</text:span></text:p>
      <text:p text:style-name="P19"/>
      <text:p text:style-name="P21"><text:span text:style-name="T30">2025/2026 - <text:s/></text:span><text:span text:style-name="T33">MONT SHASTA - </text:span><text:span text:style-name="T9">Visite dans le nouveau TELOS</text:span> après l’invasion en 2021 confirmée suite à ma <text:span text:style-name="T9">rencontre</text:span> avec <text:span text:style-name="T9">E</text:span><text:span text:style-name="T34">lena DANAAN </text:span><text:span text:style-name="T35">en Août 2024 et 2025.</text:span></text:p>
      <text:p text:style-name="P22"/>
      <text:p text:style-name="P23"><text:span text:style-name="T36">2026 - </text:span>MONT BUGARACH – Contacts avec des ET Gardiens. <text:span text:style-name="T24">Mission en cours. </text:span></text:p>
      <text:p text:style-name="P16"/>
      <text:p text:style-name="P24"/>
      <text:p text:style-name="P24"><text:span text:style-name="T9">Clientèle</text:span> = Psychologues / Médecins divers / <text:span text:style-name="T37">Pédopsychiatre / </text:span>Infirmières / <text:span text:style-name="T37">Ostéopathes / Naturopathes / Kinésiologues / Pharmacien / Directrice d’Ehpad / </text:span>Nombreux Thérapeutes <text:span text:style-name="T37">Énergétiques et autres </text:span>/ Artistes divers / Inspecteur et contrôleur<text:span text:style-name="T37">s</text:span> des Impôts / Architecte, Huissier de justice….<text:span text:style-name="T38">et tant d’autres.</text:span></text:p>
      <text:p text:style-name="P24"/>
      <text:p text:style-name="P24"/>
      <text:p text:style-name="P25"><text:span text:style-name="T15">Divers</text:span> Livres en cours d’écriture</text:p>
      <text:p text:style-name="P25"/>
      <text:p text:style-name="P5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Normal" style:font-family-generic="roman" style:font-pitch="variable" fo:font-size="13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3T08:38:34.344078200</meta:creation-date>
    <dc:title>DEFAUT</dc:title>
    <meta:editing-duration>PT1H40M4S</meta:editing-duration>
    <meta:editing-cycles>37</meta:editing-cycles>
    <meta:generator>LibreOffice/25.2.7.2$Windows_X86_64 LibreOffice_project/5cbfd1ab6520636bb5f7b99185aa69bd7456825d</meta:generator>
    <dc:date>2026-04-17T13:24:03.541235300</dc:date>
    <meta:document-statistic meta:table-count="0" meta:image-count="0" meta:object-count="0" meta:page-count="2" meta:paragraph-count="23" meta:word-count="476" meta:character-count="2932" meta:non-whitespace-character-count="2472"/>
    <meta:template xlink:type="simple" xlink:actuate="onRequest" xlink:title="DEFAUT" xlink:href="../../AppData/Roaming/LibreOffice/4/user/template/DEFAUT.ott" meta:date="2026-04-03T08:38:33.459679500"/>
  </office:meta>
</office:document-meta>
</file>