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5pt" fo:font-weight="bold" officeooo:rsid="00157ca1" officeooo:paragraph-rsid="00123118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bold" officeooo:rsid="00157ca1" officeooo:paragraph-rsid="00123118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30c7b" officeooo:paragraph-rsid="00130c7b" style:font-size-asian="13pt" style:font-weight-asian="bold" style:font-size-complex="13pt" style:font-weight-complex="bold"/>
    </style:style>
    <style:style style:name="T1" style:family="text">
      <style:text-properties officeooo:rsid="00270915"/>
    </style:style>
    <style:style style:name="T2" style:family="text">
      <style:text-properties officeooo:rsid="002597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 </text:span>BUGARACH <text:span text:style-name="T2">ET SES NOUVELLES ENERGIES</text:span></text:p>
      <text:p text:style-name="P1"/>
      <text:p text:style-name="P2"/>
      <text:p text:style-name="P2"/>
      <text:p text:style-name="P3">EXPÉRIENCES</text:p>
      <text:p text:style-name="P3"/>
      <text:p text:style-name="P3">2001</text:p>
      <text:p text:style-name="P3"/>
      <text:p text:style-name="P3">2026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IANCE ENTRE LES MONTAGNES SACRE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1T12:47:45.867781900</meta:creation-date>
    <dc:title>DEFAUT</dc:title>
    <meta:editing-duration>PT1M25S</meta:editing-duration>
    <meta:editing-cycles>3</meta:editing-cycles>
    <meta:generator>LibreOffice/25.8.5.2$Windows_X86_64 LibreOffice_project/9c8b85f387cc00a89945a79c9e6239f32e450ac2</meta:generator>
    <dc:date>2026-04-11T12:49:11.300327600</dc:date>
    <meta:document-statistic meta:table-count="0" meta:image-count="0" meta:object-count="0" meta:page-count="1" meta:paragraph-count="5" meta:word-count="14" meta:character-count="94" meta:non-whitespace-character-count="83"/>
    <meta:template xlink:type="simple" xlink:actuate="onRequest" xlink:title="DEFAUT" xlink:href="../../../AppData/Roaming/LibreOffice/4/user/template/DEFAUT.ott" meta:date="2026-04-11T12:47:45.731332900"/>
  </office:meta>
</office:document-meta>
</file>