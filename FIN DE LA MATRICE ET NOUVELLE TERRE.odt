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5pt" fo:font-weight="bold" officeooo:rsid="00204b95" officeooo:paragraph-rsid="0012ce2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57ca1" officeooo:paragraph-rsid="0012ce2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cc548" officeooo:paragraph-rsid="0012ce2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normal" officeooo:rsid="001418d1" officeooo:paragraph-rsid="0012ce2d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e659e" officeooo:paragraph-rsid="001e659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3145a5" officeooo:paragraph-rsid="003145a5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e659e" officeooo:paragraph-rsid="003145a5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normal" officeooo:rsid="003145a5" officeooo:paragraph-rsid="003145a5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418d1" officeooo:paragraph-rsid="001418d1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ad414" officeooo:paragraph-rsid="002e6fb7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weight="normal" officeooo:rsid="001ad414" officeooo:paragraph-rsid="002e6fb7" style:font-weight-asian="normal" style:font-weight-complex="normal"/>
    </style:style>
    <style:style style:name="P12" style:family="paragraph" style:parent-style-name="Standard">
      <style:text-properties fo:font-size="13pt" fo:font-weight="normal" officeooo:rsid="001ad414" officeooo:paragraph-rsid="0026ce9c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bold" officeooo:rsid="00183b6d" officeooo:paragraph-rsid="00403aa4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normal" officeooo:rsid="001744f0" officeooo:paragraph-rsid="00403aa4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2fa27f" officeooo:paragraph-rsid="00317b36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e192f" officeooo:paragraph-rsid="00317b36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744f0" officeooo:paragraph-rsid="0040aa66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1f952b" officeooo:paragraph-rsid="00403aa4" style:font-size-asian="13pt" style:font-weight-asian="normal" style:font-size-complex="13pt" style:font-weight-complex="normal"/>
    </style:style>
    <style:style style:name="P19" style:family="paragraph" style:parent-style-name="Standard">
      <style:text-properties officeooo:rsid="00207c27" officeooo:paragraph-rsid="00403aa4"/>
    </style:style>
    <style:style style:name="P20" style:family="paragraph" style:parent-style-name="Standard">
      <style:text-properties officeooo:rsid="001553a9" officeooo:paragraph-rsid="00382bba"/>
    </style:style>
    <style:style style:name="P21" style:family="paragraph" style:parent-style-name="Standard">
      <style:text-properties fo:font-size="13pt" fo:font-weight="normal" officeooo:rsid="001744f0" officeooo:paragraph-rsid="00382bba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1744f0" officeooo:paragraph-rsid="00183b6d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bold" officeooo:rsid="001418d1" officeooo:paragraph-rsid="00183b6d" style:font-size-asian="13pt" style:font-weight-asian="bold" style:font-size-complex="13pt" style:font-weight-complex="bold"/>
    </style:style>
    <style:style style:name="P24" style:family="paragraph" style:parent-style-name="Standard">
      <style:text-properties fo:font-size="13pt" fo:font-weight="bold" officeooo:rsid="00155cfe" officeooo:paragraph-rsid="00183b6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normal" officeooo:rsid="001418d1" officeooo:paragraph-rsid="00183b6d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normal" officeooo:rsid="004833dd" officeooo:paragraph-rsid="004833dd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font-weight="normal" officeooo:rsid="004d47ef" officeooo:paragraph-rsid="004d47ef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fo:font-weight="normal" officeooo:rsid="00155cfe" officeooo:paragraph-rsid="00183b6d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fo:font-weight="normal" officeooo:rsid="001e192f" officeooo:paragraph-rsid="001e192f" style:font-size-asian="13pt" style:font-weight-asian="normal" style:font-size-complex="13pt" style:font-weight-complex="normal"/>
    </style:style>
    <style:style style:name="P30" style:family="paragraph" style:parent-style-name="Standard">
      <style:text-properties officeooo:rsid="003533dc" officeooo:paragraph-rsid="00435ac9"/>
    </style:style>
    <style:style style:name="P31" style:family="paragraph" style:parent-style-name="Standard">
      <style:text-properties fo:font-size="13pt" fo:font-weight="normal" officeooo:rsid="001744f0" officeooo:paragraph-rsid="00435ac9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44ea1f" officeooo:paragraph-rsid="0044ea1f" style:font-size-asian="13pt" style:font-weight-asian="normal" style:font-size-complex="13pt" style:font-weight-complex="normal"/>
    </style:style>
    <style:style style:name="T1" style:family="text">
      <style:text-properties officeooo:rsid="0038d3d4"/>
    </style:style>
    <style:style style:name="T2" style:family="text">
      <style:text-properties officeooo:rsid="003a16a5"/>
    </style:style>
    <style:style style:name="T3" style:family="text">
      <style:text-properties officeooo:rsid="0022697a"/>
    </style:style>
    <style:style style:name="T4" style:family="text">
      <style:text-properties officeooo:rsid="003b7546"/>
    </style:style>
    <style:style style:name="T5" style:family="text">
      <style:text-properties officeooo:rsid="002cd3f6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f952b" style:font-size-asian="13pt" style:font-size-complex="13pt"/>
    </style:style>
    <style:style style:name="T8" style:family="text">
      <style:text-properties fo:font-size="13pt" officeooo:rsid="0028357b" style:font-size-asian="13pt" style:font-size-complex="13pt"/>
    </style:style>
    <style:style style:name="T9" style:family="text">
      <style:text-properties officeooo:rsid="00403aa4"/>
    </style:style>
    <style:style style:name="T10" style:family="text">
      <style:text-properties officeooo:rsid="00155cfe" style:font-size-asian="11.3500003814697pt"/>
    </style:style>
    <style:style style:name="T11" style:family="text">
      <style:text-properties officeooo:rsid="004cbd5f" style:font-size-asian="11.3500003814697pt"/>
    </style:style>
    <style:style style:name="T12" style:family="text">
      <style:text-properties officeooo:rsid="003d5b89"/>
    </style:style>
    <style:style style:name="T13" style:family="text">
      <style:text-properties officeooo:rsid="0023c318"/>
    </style:style>
    <style:style style:name="T14" style:family="text">
      <style:text-properties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28357b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1f952b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1ad414" style:font-size-asian="13pt" style:font-weight-asian="normal" style:font-size-complex="13pt" style:font-weight-complex="normal"/>
    </style:style>
    <style:style style:name="T18" style:family="text">
      <style:text-properties officeooo:rsid="004f2725"/>
    </style:style>
    <style:style style:name="T19" style:family="text">
      <style:text-properties officeooo:rsid="0049fe19"/>
    </style:style>
    <style:style style:name="T20" style:family="text">
      <style:text-properties officeooo:rsid="001e65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 DE LA MATRICE <text:span text:style-name="T1">ET NOUVELLE TERRE</text:span></text:p>
      <text:p text:style-name="P2"/>
      <text:p text:style-name="P3"><text:span text:style-name="T2">TIME LINES / </text:span>STARGATE / ARTEFACTS / INNER EARTH </text:p>
      <text:p text:style-name="P2"/>
      <text:p text:style-name="P4"/>
      <text:p text:style-name="P5"/>
      <text:p text:style-name="P6"><text:span text:style-name="T2">ÉCHEC DU PLAN D’</text:span>INVASION PAR DES E.T INVOLUTIFS <text:span text:style-name="T2">= TIME LINE N.1</text:span></text:p>
      <text:p text:style-name="P7"/>
      <text:p text:style-name="P8">Effondrement de la Matrice <text:span text:style-name="T2">en cours</text:span> = Outil de manipulation et de substitution de la <text:span text:style-name="T2">r</text:span>ace <text:span text:style-name="T2">h</text:span>umaine par hybridation totale pour <text:span text:style-name="T2">occupation</text:span> de la planète.</text:p>
      <text:p text:style-name="P5"/>
      <text:p text:style-name="P5">Nombreux contacts et expériences avec des ET dans le plan astral depuis 2001 = Greys / Un Draco Reptilien / <text:span text:style-name="T2">Pleiadien <text:s/>et surtout Telosiens.</text:span></text:p>
      <text:p text:style-name="P5"/>
      <text:p text:style-name="P9">DVD DEBOWSKA <text:span text:style-name="T3">de 08/2022 au MONT BUGARACH - « EXTRA TERRESTRES </text:span><text:span text:style-name="T4">= </text:span><text:span text:style-name="T3">ENVAHISSEURS SUBTILS DE LA MATRICE 3D OU REVELATEURS DE LA FA</text:span><text:span text:style-name="T5">M</text:span><text:span text:style-name="T3">ILLE GALACTIQUE ».</text:span></text:p>
      <text:p text:style-name="P10"/>
      <text:p text:style-name="P11"><text:span text:style-name="T6">DVD DEBOWSKA - CONFÉRENCE suite à la projection du DVD</text:span><text:span text:style-name="T7"> </text:span><text:span text:style-name="T6">lors du FORUM EXPÉRIENCES D’AUTRES MONDES du 15 au 17 Août 2025 </text:span><text:span text:style-name="T8">à RENNES-LES-BAINS.</text:span></text:p>
      <text:p text:style-name="P12"/>
      <text:p text:style-name="P12"/>
      <text:p text:style-name="P13"/>
      <text:p text:style-name="P13">RETOUR <text:span text:style-name="T9">VERS LE FUTUR</text:span> POUR CRÉER LA NOUVELLE LIGNE SPATIO TEMPORELLE <text:span text:style-name="T9">DU « </text:span><text:span text:style-name="T10">AWAKENING </text:span><text:span text:style-name="T11">RESEAT </text:span><text:span text:style-name="T10">» </text:span><text:span text:style-name="T2">= TIME LINE N.</text:span><text:span text:style-name="T9">2</text:span></text:p>
      <text:p text:style-name="P14"/>
      <text:p text:style-name="P15">Solar Flash / Activation d’Artefacts par des E.T ou des I.T en collaboration avec <text:span text:style-name="T4">une Alliance de </text:span>militaires <text:span text:style-name="T4">internationaux.</text:span></text:p>
      <text:p text:style-name="P16"/>
      <text:p text:style-name="P16"><text:span text:style-name="T12">Conjonction</text:span> des <text:span text:style-name="T13">T</text:span>ime <text:span text:style-name="T13">L</text:span>ines en une seule </text:p>
      <text:p text:style-name="P17">« Nous sommes les ancêtres du Futur » </text:p>
      <text:p text:style-name="P18"/>
      <text:p text:style-name="P19"><text:span text:style-name="T14">DVD DEBOWSKA - C</text:span><text:span text:style-name="T15">ONFÉRENCE </text:span><text:span text:style-name="T14">du 15 Août 2025</text:span><text:span text:style-name="T16"> - <text:s/>« </text:span><text:span text:style-name="T14">PRÊT POUR DEVENIR UN HUMAIN GALACTIQUE ? ACTUALITÉS INTRA ET EXTRA TERRESTRE » </text:span><text:span text:style-name="T17">lors du FORUM EXPÉRIENCES D’AUTRES MONDES du 15 au 17 Août 2025 </text:span><text:span text:style-name="T15">à RENNES-LES-BAINS.</text:span></text:p>
      <text:p text:style-name="P20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4"><text:soft-page-break/>LA NOUVELLE TERRE</text:p>
      <text:p text:style-name="P25"/>
      <text:p text:style-name="P26">APOCALYPSE NOW - La véritable Révélation = Les humains sortent de la Matrice d’illusion et de manipulation et découvrent que les dimensions sont imbriquées, <text:span text:style-name="T18">constituant la CONSCIENCE UNIFIEE.</text:span></text:p>
      <text:p text:style-name="P25"/>
      <text:p text:style-name="P27">« LA PRÉSENCE DU FUTUR » via la multiplication des OVNIS <text:span text:style-name="T18">et la venue du 3IAtlas, </text:span>provoque de très fortes éruptions solaires et des flux intenses de rayon X ; générant une situation similaire à un évènement qui se produit tous les 30 000 ans. </text:p>
      <text:p text:style-name="P26">La collaboration des E.T évolutifs, frères et amis de l’humanité ou parties de nous même dans une version de notre futur, <text:span text:style-name="T19">contribue activement </text:span>à la révélation de notre Multidimensionnalité.</text:p>
      <text:p text:style-name="P26"/>
      <text:p text:style-name="P26">La nouvelle Terre se révèle progressivement <text:span text:style-name="T19">offrant l’opportunité de devenir un Humain Divin Créateur, certes au-delà de la 3D mais technologique car dans cette galaxie la technologie sous différentes formes occupe une place importante <text:s/>= ce vaste programme est déjà en cours <text:s/>! </text:span></text:p>
      <text:p text:style-name="P26"/>
      <text:p text:style-name="P26"/>
      <text:p text:style-name="P25"/>
      <text:p text:style-name="P28">Reliance au champ unifié</text:p>
      <text:p text:style-name="P28"/>
      <text:p text:style-name="P25">DVD DEBOSWKA <text:span text:style-name="T13">de 08/2022 au MONT BUGARACH - « LE CHAMP UNIFIE - LA NOUVELLE CONSCIENCE PLANÉTAIRE ». </text:span></text:p>
      <text:p text:style-name="P25"/>
      <text:p text:style-name="P25"/>
      <text:p text:style-name="P29">Reli<text:span text:style-name="T20">a</text:span>nce de nouveaux lieux</text:p>
      <text:p text:style-name="P29"/>
      <text:p text:style-name="P30">DVD DEBOWSKA <text:s/>– TABLE RONDE DU FORUM « EXPÉRIENCES D’AUTRES MONDES du 15 au 17 Août 2025 à RENNES-LES-BAINS » organisé par Christine CAL <text:s/>avec ANNE GIVAUDAN </text:p>
      <text:p text:style-name="P31"/>
      <text:p text:style-name="P32">Voir le NOUVEAU TELOS au MONT SHASTA et le NOUVEAU BUGARACH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14:06:56.523636600</meta:creation-date>
    <dc:title>DEFAUT</dc:title>
    <meta:editing-duration>PT8H38M24S</meta:editing-duration>
    <meta:editing-cycles>45</meta:editing-cycles>
    <meta:generator>LibreOffice/25.8.5.2$Windows_X86_64 LibreOffice_project/9c8b85f387cc00a89945a79c9e6239f32e450ac2</meta:generator>
    <dc:date>2026-04-13T19:15:57.186108300</dc:date>
    <meta:document-statistic meta:table-count="0" meta:image-count="0" meta:object-count="0" meta:page-count="2" meta:paragraph-count="22" meta:word-count="428" meta:character-count="2521" meta:non-whitespace-character-count="2101"/>
    <meta:template xlink:type="simple" xlink:actuate="onRequest" xlink:title="DEFAUT" xlink:href="../AppData/Roaming/LibreOffice/4/user/template/DEFAUT.ott" meta:date="2026-04-11T14:06:56.380191700"/>
  </office:meta>
</office:document-meta>
</file>