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5pt" fo:font-weight="bold" officeooo:rsid="00157ca1" officeooo:paragraph-rsid="0016f7f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a7233" officeooo:paragraph-rsid="0016f7f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57ca1" officeooo:paragraph-rsid="0012b37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157ca1" officeooo:paragraph-rsid="0012b374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officeooo:rsid="0013b265" officeooo:paragraph-rsid="0013b265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16f7f3" officeooo:paragraph-rsid="0013b265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5pt" fo:font-weight="bold" officeooo:rsid="00157ca1" officeooo:paragraph-rsid="00174c0e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3pt" fo:font-weight="bold" officeooo:rsid="00155cfe" officeooo:paragraph-rsid="00174c0e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normal" officeooo:rsid="00174c0e" officeooo:paragraph-rsid="00174c0e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d680c" officeooo:paragraph-rsid="001d680c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418d1" officeooo:paragraph-rsid="00174c0e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ad414" officeooo:paragraph-rsid="001ad414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bold" officeooo:rsid="00157ca1" officeooo:paragraph-rsid="00174c0e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5pt" fo:font-weight="bold" officeooo:rsid="002a7233" officeooo:paragraph-rsid="00174c0e" style:font-size-asian="15pt" style:font-weight-asian="bold" style:font-size-complex="15pt" style:font-weight-complex="bold"/>
    </style:style>
    <style:style style:name="T1" style:family="text">
      <style:text-properties officeooo:rsid="002ed7b4"/>
    </style:style>
    <style:style style:name="T2" style:family="text">
      <style:text-properties officeooo:rsid="002a7233"/>
    </style:style>
    <style:style style:name="T3" style:family="text">
      <style:text-properties officeooo:rsid="001e2c26"/>
    </style:style>
    <style:style style:name="T4" style:family="text">
      <style:text-properties officeooo:rsid="00150124"/>
    </style:style>
    <style:style style:name="T5" style:family="text">
      <style:text-properties officeooo:rsid="00174c0e"/>
    </style:style>
    <style:style style:name="T6" style:family="text">
      <style:text-properties officeooo:rsid="0019c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PS DE LUMIÈRE CRISTALLIN VORTEX DE L’ÂME <text:span text:style-name="T1">=</text:span></text:p>
      <text:p text:style-name="P1"/>
      <text:p text:style-name="P1"><text:span text:style-name="T1">OUTIL DE REINTEGRATION DE SES FRACTALES ET </text:span><text:span text:style-name="T2">V</text:span><text:span text:style-name="T1">AISSEAU INTERGALACTIQUE DE LA CONSCIENCE </text:span></text:p>
      <text:p text:style-name="P2"><text:s/></text:p>
      <text:p text:style-name="P3"/>
      <text:p text:style-name="P3"/>
      <text:p text:style-name="P3"/>
      <text:p text:style-name="P3"/>
      <text:p text:style-name="P4">CORPS DE LUMIÈRE CRISTALLIN VORTEX DE L’ÂME</text:p>
      <text:p text:style-name="P4"/>
      <text:p text:style-name="P5"/>
      <text:p text:style-name="P5">Objectif Reprendre les bandeaux <text:span text:style-name="T3">du site initial ( STAGES D’EVEIL QUANTIQUE ) </text:span><text:span text:style-name="T4">pour les 3 étapes et les titres – Ne pas détailler </text:span></text:p>
      <text:p text:style-name="P5"/>
      <text:p text:style-name="P5"/>
      <text:p text:style-name="P6"/>
      <text:p text:style-name="P5"/>
      <text:p text:style-name="P5"/>
      <text:p text:style-name="P7"/>
      <text:p text:style-name="P8"><text:span text:style-name="T5">OUTIL DE </text:span>REINTEGRATION DES FRACTALES PAR L’AME</text:p>
      <text:p text:style-name="P9"/>
      <text:p text:style-name="P10">Mes guides en 2012 = « Vous connaîtrez la Compression de l’Âme »</text:p>
      <text:p text:style-name="P9"/>
      <text:p text:style-name="P9"/>
      <text:p text:style-name="P9">Synthèse de cycle Terrestre avec réintégration des dites vies passées </text:p>
      <text:p text:style-name="P9"/>
      <text:p text:style-name="P11">DVD DEBOWSKA <text:span text:style-name="T6">de 08/2023 à RENNES-Les</text:span>-<text:span text:style-name="T6">BAINS - </text:span> « R<text:span text:style-name="T6">EINTEGRATION DE NOS VIES PASSÉES – PERCEPTION DE NOS FRACTALES DU FUTUR ». </text:span></text:p>
      <text:p text:style-name="P12"/>
      <text:p text:style-name="P12">DVD DEBOWSKA – CONFÉRENCE suite à la projection du DVD précédent lors du FORUM EXPÉRIENCES D’AUTRES MONDES  SUITE A LA PROJECTION DU FILM du 15 au 17 Août 2025.</text:p>
      <text:p text:style-name="P11"/>
      <text:p text:style-name="P5"/>
      <text:p text:style-name="P5"/>
      <text:p text:style-name="P13"><text:span text:style-name="T2">V</text:span><text:span text:style-name="T1">AISSEAU INTERGALACTIQUE DE LA CONSCIENCE </text:span></text:p>
      <text:p text:style-name="P14"><text:s/></text:p>
      <text:p text:style-name="P9">Véritable vaisseau de l’Âme reliée au SOI permettant à la conscience, voire au corps spirituel de naviguer dans l’espace temps et les galaxies.</text:p>
      <text:p text:style-name="P9">Retrouvaille de sa famille Galactique et de son histoire</text:p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12:13:43.885266000</meta:creation-date>
    <dc:title>DEFAUT</dc:title>
    <meta:editing-duration>PT21M8S</meta:editing-duration>
    <meta:editing-cycles>10</meta:editing-cycles>
    <meta:generator>LibreOffice/25.2.7.2$Windows_X86_64 LibreOffice_project/5cbfd1ab6520636bb5f7b99185aa69bd7456825d</meta:generator>
    <dc:date>2026-04-17T13:27:50.453056900</dc:date>
    <meta:document-statistic meta:table-count="0" meta:image-count="0" meta:object-count="0" meta:page-count="1" meta:paragraph-count="14" meta:word-count="164" meta:character-count="1008" meta:non-whitespace-character-count="844"/>
    <meta:template xlink:type="simple" xlink:actuate="onRequest" xlink:title="DEFAUT" xlink:href="../../../AppData/Roaming/LibreOffice/4/user/template/DEFAUT.ott" meta:date="2026-04-11T12:13:43.749107900"/>
  </office:meta>
</office:document-meta>
</file>