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5pt" fo:font-weight="bold" officeooo:rsid="001248d5" officeooo:paragraph-rsid="001248d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44727" officeooo:paragraph-rsid="00144727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248d5" officeooo:paragraph-rsid="001248d5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207c27" officeooo:paragraph-rsid="00207c27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officeooo:rsid="001248d5" officeooo:paragraph-rsid="001248d5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5pt" fo:font-weight="bold" officeooo:rsid="001507cb" officeooo:paragraph-rsid="001507cb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3pt" fo:font-weight="normal" officeooo:rsid="0013541b" officeooo:paragraph-rsid="0013541b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f9055" officeooo:paragraph-rsid="001f9055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44727" officeooo:paragraph-rsid="0013541b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5pt" fo:font-weight="bold" officeooo:rsid="001507cb" officeooo:paragraph-rsid="0013541b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3pt" fo:font-weight="normal" officeooo:rsid="001507cb" officeooo:paragraph-rsid="0013541b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f952b" officeooo:paragraph-rsid="001f952b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207c27" officeooo:paragraph-rsid="0028357b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418d1" officeooo:paragraph-rsid="0028357b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5pt" fo:font-weight="bold" officeooo:rsid="0016507b" officeooo:paragraph-rsid="0028357b" style:font-size-asian="15pt" style:font-weight-asian="bold" style:font-size-complex="15pt" style:font-weight-complex="bold"/>
    </style:style>
    <style:style style:name="P16" style:family="paragraph" style:parent-style-name="Standard">
      <style:text-properties fo:font-weight="normal" officeooo:rsid="0023aa83" officeooo:paragraph-rsid="001f4257" style:font-weight-asian="normal" style:font-weight-complex="normal"/>
    </style:style>
    <style:style style:name="P17" style:family="paragraph" style:parent-style-name="Standard">
      <style:text-properties fo:font-size="13pt" fo:font-weight="normal" officeooo:rsid="001ad414" officeooo:paragraph-rsid="0024cf11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1418d1" officeooo:paragraph-rsid="0024cf11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5pt" fo:font-weight="bold" officeooo:rsid="0016507b" officeooo:paragraph-rsid="0016507b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3pt" fo:font-weight="normal" officeooo:rsid="0016507b" officeooo:paragraph-rsid="0016507b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bold" officeooo:rsid="0017e3c5" officeooo:paragraph-rsid="0017e3c5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normal" officeooo:rsid="0017e3c5" officeooo:paragraph-rsid="0017e3c5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bold" officeooo:rsid="0017867d" officeooo:paragraph-rsid="0017867d" style:font-size-asian="11.3500003814697pt" style:font-weight-asian="bold" style:font-size-complex="13pt" style:font-weight-complex="bold"/>
    </style:style>
    <style:style style:name="T1" style:family="text">
      <style:text-properties officeooo:rsid="001e6fd8"/>
    </style:style>
    <style:style style:name="T2" style:family="text">
      <style:text-properties officeooo:rsid="00144727"/>
    </style:style>
    <style:style style:name="T3" style:family="text">
      <style:text-properties officeooo:rsid="0017e3c5"/>
    </style:style>
    <style:style style:name="T4" style:family="text">
      <style:text-properties officeooo:rsid="00225bb1"/>
    </style:style>
    <style:style style:name="T5" style:family="text">
      <style:text-properties officeooo:rsid="00207c27"/>
    </style:style>
    <style:style style:name="T6" style:family="text">
      <style:text-properties officeooo:rsid="0028357b"/>
    </style:style>
    <style:style style:name="T7" style:family="text">
      <style:text-properties officeooo:rsid="001f952b"/>
    </style:style>
    <style:style style:name="T8" style:family="text">
      <style:text-properties officeooo:rsid="001ad414"/>
    </style:style>
    <style:style style:name="T9" style:family="text">
      <style:text-properties officeooo:rsid="001f4257"/>
    </style:style>
    <style:style style:name="T10" style:family="text">
      <style:text-properties officeooo:rsid="00253aec"/>
    </style:style>
    <style:style style:name="T11" style:family="text">
      <style:text-properties officeooo:rsid="0024cf1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a87b3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 </text:span>MONT SHASTA <text:span text:style-name="T1">ET LE NOUVEAU TELOS </text:span></text:p>
      <text:p text:style-name="P1"/>
      <text:p text:style-name="P2">Mettre le bandeau avec images qui défilent </text:p>
      <text:p text:style-name="P3">Garder l’ image <text:span text:style-name="T2">avec Rayons</text:span></text:p>
      <text:p text:style-name="P2"/>
      <text:p text:style-name="P2">Inclure =</text:p>
      <text:p text:style-name="P2">- les vidéos déjà sur le site</text:p>
      <text:p text:style-name="P2">- la vidéo du voyage</text:p>
      <text:p text:style-name="P2">- <text:span text:style-name="T3">vidéo conférence Communauté de l’abondance </text:span></text:p>
      <text:p text:style-name="P2">DVD <text:span text:style-name="T3">DEBOWSKA </text:span><text:span text:style-name="T4">de 04/2019</text:span> – <text:span text:style-name="T5">MONT SHASTA – TERRE CREUSE – VOYAGES MULTIDIMENSIONNELS -</text:span></text:p>
      <text:p text:style-name="P4">DVD DEBOWSKA <text:span text:style-name="T4">de 04/2019 </text:span>– Version sous titrée en anglais -MOUNT SHASTA – HOLLOW EARTH – MULTIDIMENSIONAL TRAVELS ».</text:p>
      <text:p text:style-name="P2"/>
      <text:p text:style-name="P3">12 VOYAGES AU MONT SHASTA depuis 2004</text:p>
      <text:p text:style-name="P3"/>
      <text:p text:style-name="P3">RENCONTRE AVEC AURELIA LOUISE JONES via Jean Claude GENEL en 2004 (photo Livre) </text:p>
      <text:p text:style-name="P3"/>
      <text:p text:style-name="P3">RENCONTRE AVEC DIANNE ROBBINS en 2017 et contacts permanents (photo Livre)</text:p>
      <text:p text:style-name="P3"/>
      <text:p text:style-name="P3">RENCONTRES ITERNATIONNALES AVEC LA FONDATION TELOS MONDIAL entre 2015 et 2018</text:p>
      <text:p text:style-name="P3"/>
      <text:p text:style-name="P3"/>
      <text:p text:style-name="P3"/>
      <text:p text:style-name="P3"/>
      <text:p text:style-name="P5"/>
      <text:p text:style-name="P6">TELOS </text:p>
      <text:p text:style-name="P3"/>
      <text:p text:style-name="P3">ANIMATION DE SEMINAIRES INITIATIQUES AU MONT SHASTA entre 2014 et 2018</text:p>
      <text:p text:style-name="P7">Channeling avec les TELOSIENS dont un Grand Sage de TELOS, le Maître ADAMA et Maîtres Ascensionnés dont le Maître Saint Germain </text:p>
      <text:p text:style-name="P7">Cérémonie d’Ascension à la Fondation TELOS <text:span text:style-name="T2">à SHASTA</text:span></text:p>
      <text:p text:style-name="P8">Nombreux stages sur les Rayons ou Flammes Sacrées avec channeling des Maîtres Ascensionnés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LE NOUVEAU TELOS d’après 2021</text:p>
      <text:p text:style-name="P11"/>
      <text:p text:style-name="P12">FIN DE LA GUERRE GALACTIQUE</text:p>
      <text:p text:style-name="P12"/>
      <text:p text:style-name="P13">DVD DEBOWSKA - C<text:span text:style-name="T6">ONFÉRENCE </text:span>du 15 Août 2025<text:span text:style-name="T7"> - <text:s/>« </text:span>PRÊT POUR DEVENIR UN HUMAIN GALACTIQUE ? ACTUALITÉS INTRA ET EXTRA TERRESTRE » <text:span text:style-name="T8">lors du FORUM EXPÉRIENCES D’AUTRES MONDES du 15 au 17 Août 2025 </text:span><text:span text:style-name="T6">à RENNES-LES-BAINS.</text:span></text:p>
      <text:p text:style-name="P14"/>
      <text:p text:style-name="P15"/>
      <text:p text:style-name="P12"/>
      <text:p text:style-name="P12"/>
      <text:p text:style-name="P12">INVASION A TELOS </text:p>
      <text:p text:style-name="P16"><text:span text:style-name="T9">Nombreux voyages astraux</text:span> dans le nouveau TELOS après l’invasion en 2021 confirmée suite à ma rencontre avec E<text:span text:style-name="T10">lena DANAAN -</text:span></text:p>
      <text:p text:style-name="P17">DVD DEBOWSKA - CONFÉRENCE <text:span text:style-name="T11">du 16 Août 2025 </text:span><text:span text:style-name="T7">– « MONT SHASTA LE NOUVEAU TELOS APRES LA GUERRE GALACTIQUE » </text:span>lors du FORUM EXPÉRIENCES D’AUTRES MONDES du 15 au 17 Août 2025 <text:span text:style-name="T6">à RENNES-LES-BAINS.</text:span></text:p>
      <text:p text:style-name="P18"/>
      <text:p text:style-name="P19"/>
      <text:p text:style-name="P19"/>
      <text:p text:style-name="P19">RENCONTRES INITIATIQUES EN DORDOGNE<text:span text:style-name="T12"> –</text:span><text:span text:style-name="T13"> </text:span><text:span text:style-name="T14">Me contacter 06.80.42.85.91 </text:span></text:p>
      <text:p text:style-name="P20"/>
      <text:p text:style-name="P21">STAGE INITIATIQUE = ACCÉDER A SA MULTIDIMENSIONNALITE</text:p>
      <text:p text:style-name="P22">A partir de documents secrets de SHARULA DUX et de l’enseignement des TELOSIENS</text:p>
      <text:p text:style-name="P19"/>
      <text:p text:style-name="P23"/>
      <text:p text:style-name="P23">VOYAGES EN EXPANSION DE CONSCIENCE OU VOYAGE ASTRAL </text:p>
      <text:p text:style-name="P20">Reprendre les témoignag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09:29:22.589158500</meta:creation-date>
    <dc:title>DEFAUT</dc:title>
    <meta:editing-duration>PT3H1M12S</meta:editing-duration>
    <meta:editing-cycles>22</meta:editing-cycles>
    <meta:generator>LibreOffice/25.8.5.2$Windows_X86_64 LibreOffice_project/9c8b85f387cc00a89945a79c9e6239f32e450ac2</meta:generator>
    <dc:date>2026-04-11T20:20:27.046531900</dc:date>
    <meta:document-statistic meta:table-count="0" meta:image-count="0" meta:object-count="0" meta:page-count="2" meta:paragraph-count="29" meta:word-count="303" meta:character-count="1886" meta:non-whitespace-character-count="1593"/>
    <meta:template xlink:type="simple" xlink:actuate="onRequest" xlink:title="DEFAUT" xlink:href="../../AppData/Roaming/LibreOffice/4/user/template/DEFAUT.ott" meta:date="2026-04-11T09:29:22.429834400"/>
  </office:meta>
</office:document-meta>
</file>